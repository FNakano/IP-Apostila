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ewton para raiz de cin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$y_i$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$f(y_i)$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$y_{i+1}$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formula="of:=[.B3]*[.B3]-5"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table:formula="of:=(-[.D3]/(2*[.B3]))+[.B3]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3]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[.B4]*[.B4]-5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formula="of:=(-[.D4]/(2*[.B4]))+[.B4]" office:value-type="float" office:value="2.33333333333333" calcext:value-type="float">
            <text:p>2,33333333333333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4]" office:value-type="float" office:value="2.33333333333333" calcext:value-type="float">
            <text:p>2,33333333333333</text:p>
          </table:table-cell>
          <table:table-cell office:value-type="string" calcext:value-type="string">
            <text:p>|</text:p>
          </table:table-cell>
          <table:table-cell table:formula="of:=[.B5]*[.B5]-5" office:value-type="float" office:value="0.444444444444446" calcext:value-type="float">
            <text:p>0,444444444444446</text:p>
          </table:table-cell>
          <table:table-cell office:value-type="string" calcext:value-type="string">
            <text:p>|</text:p>
          </table:table-cell>
          <table:table-cell table:formula="of:=(-[.D5]/(2*[.B5]))+[.B5]" office:value-type="float" office:value="2.23809523809524" calcext:value-type="float">
            <text:p>2,23809523809524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5]" office:value-type="float" office:value="2.23809523809524" calcext:value-type="float">
            <text:p>2,23809523809524</text:p>
          </table:table-cell>
          <table:table-cell office:value-type="string" calcext:value-type="string">
            <text:p>|</text:p>
          </table:table-cell>
          <table:table-cell table:formula="of:=[.B6]*[.B6]-5" office:value-type="float" office:value="0.0090702947845811" calcext:value-type="float">
            <text:p>0,0090702947845811</text:p>
          </table:table-cell>
          <table:table-cell office:value-type="string" calcext:value-type="string">
            <text:p>|</text:p>
          </table:table-cell>
          <table:table-cell table:formula="of:=(-[.D6]/(2*[.B6]))+[.B6]" office:value-type="float" office:value="2.23606889564336" calcext:value-type="float">
            <text:p>2,23606889564336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6]" office:value-type="float" office:value="2.23606889564336" calcext:value-type="float">
            <text:p>2,23606889564336</text:p>
          </table:table-cell>
          <table:table-cell office:value-type="string" calcext:value-type="string">
            <text:p>|</text:p>
          </table:table-cell>
          <table:table-cell table:formula="of:=[.B7]*[.B7]-5" office:value-type="float" office:value="0.00000410606373080213" calcext:value-type="float">
            <text:p>4,10606373080213E-06</text:p>
          </table:table-cell>
          <table:table-cell office:value-type="string" calcext:value-type="string">
            <text:p>|</text:p>
          </table:table-cell>
          <table:table-cell table:formula="of:=(-[.D7]/(2*[.B7]))+[.B7]" office:value-type="float" office:value="2.23606797749998" calcext:value-type="float">
            <text:p>2,23606797749998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7]" office:value-type="float" office:value="2.23606797749998" calcext:value-type="float">
            <text:p>2,23606797749998</text:p>
          </table:table-cell>
          <table:table-cell office:value-type="string" calcext:value-type="string">
            <text:p>|</text:p>
          </table:table-cell>
          <table:table-cell table:formula="of:=[.B8]*[.B8]-5" office:value-type="float" office:value="0.00000000000084288132" calcext:value-type="float">
            <text:p>8,42881320295419E-13</text:p>
          </table:table-cell>
          <table:table-cell office:value-type="string" calcext:value-type="string">
            <text:p>|</text:p>
          </table:table-cell>
          <table:table-cell table:formula="of:=(-[.D8]/(2*[.B8]))+[.B8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8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B9]*[.B9]-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(-[.D9]/(2*[.B9]))+[.B9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9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B10]*[.B10]-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(-[.D10]/(2*[.B10]))+[.B10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10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B11]*[.B11]-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(-[.D11]/(2*[.B11]))+[.B11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11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B12]*[.B12]-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(-[.D12]/(2*[.B12]))+[.B12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12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B13]*[.B13]-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(-[.D13]/(2*[.B13]))+[.B13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formula="of:=[.F13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B14]*[.B14]-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(-[.D14]/(2*[.B14]))+[.B14]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er prova1.md!!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issecção para raiz de ci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x=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table:style-name="ce1" office:value-type="string" calcext:value-type="string">
            <text:p>inferior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superior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médio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(médio)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formula="of:=([.B28]+[.D28])/2" office:value-type="float" office:value="2.5" calcext:value-type="float">
            <text:p>2,5</text:p>
          </table:table-cell>
          <table:table-cell office:value-type="string" calcext:value-type="string">
            <text:p>|</text:p>
          </table:table-cell>
          <table:table-cell table:formula="of:=[.F28]*[.F28]" office:value-type="float" office:value="6.25" calcext:value-type="float">
            <text:p>6,2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28]&lt;[.$H$26];[.F28];[.B28])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IF([.H28]&gt;[.$H$26];[.F28];[.D28])" office:value-type="float" office:value="2.5" calcext:value-type="float">
            <text:p>2,5</text:p>
          </table:table-cell>
          <table:table-cell office:value-type="string" calcext:value-type="string">
            <text:p>|</text:p>
          </table:table-cell>
          <table:table-cell table:formula="of:=([.B29]+[.D29])/2" office:value-type="float" office:value="1.25" calcext:value-type="float">
            <text:p>1,25</text:p>
          </table:table-cell>
          <table:table-cell office:value-type="string" calcext:value-type="string">
            <text:p>|</text:p>
          </table:table-cell>
          <table:table-cell table:formula="of:=[.F29]*[.F29]" office:value-type="float" office:value="1.5625" calcext:value-type="float">
            <text:p>1,562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29]&lt;[.$H$26];[.F29];[.B29])" office:value-type="float" office:value="1.25" calcext:value-type="float">
            <text:p>1,25</text:p>
          </table:table-cell>
          <table:table-cell office:value-type="string" calcext:value-type="string">
            <text:p>|</text:p>
          </table:table-cell>
          <table:table-cell table:formula="of:=IF([.H29]&gt;[.$H$26];[.F29];[.D29])" office:value-type="float" office:value="2.5" calcext:value-type="float">
            <text:p>2,5</text:p>
          </table:table-cell>
          <table:table-cell office:value-type="string" calcext:value-type="string">
            <text:p>|</text:p>
          </table:table-cell>
          <table:table-cell table:formula="of:=([.B30]+[.D30])/2" office:value-type="float" office:value="1.875" calcext:value-type="float">
            <text:p>1,875</text:p>
          </table:table-cell>
          <table:table-cell office:value-type="string" calcext:value-type="string">
            <text:p>|</text:p>
          </table:table-cell>
          <table:table-cell table:formula="of:=[.F30]*[.F30]" office:value-type="float" office:value="3.515625" calcext:value-type="float">
            <text:p>3,51562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0]&lt;[.$H$26];[.F30];[.B30])" office:value-type="float" office:value="1.875" calcext:value-type="float">
            <text:p>1,875</text:p>
          </table:table-cell>
          <table:table-cell office:value-type="string" calcext:value-type="string">
            <text:p>|</text:p>
          </table:table-cell>
          <table:table-cell table:formula="of:=IF([.H30]&gt;[.$H$26];[.F30];[.D30])" office:value-type="float" office:value="2.5" calcext:value-type="float">
            <text:p>2,5</text:p>
          </table:table-cell>
          <table:table-cell office:value-type="string" calcext:value-type="string">
            <text:p>|</text:p>
          </table:table-cell>
          <table:table-cell table:formula="of:=([.B31]+[.D31])/2" office:value-type="float" office:value="2.1875" calcext:value-type="float">
            <text:p>2,1875</text:p>
          </table:table-cell>
          <table:table-cell office:value-type="string" calcext:value-type="string">
            <text:p>|</text:p>
          </table:table-cell>
          <table:table-cell table:formula="of:=[.F31]*[.F31]" office:value-type="float" office:value="4.78515625" calcext:value-type="float">
            <text:p>4,7851562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1]&lt;[.$H$26];[.F31];[.B31])" office:value-type="float" office:value="2.1875" calcext:value-type="float">
            <text:p>2,1875</text:p>
          </table:table-cell>
          <table:table-cell office:value-type="string" calcext:value-type="string">
            <text:p>|</text:p>
          </table:table-cell>
          <table:table-cell table:formula="of:=IF([.H31]&gt;[.$H$26];[.F31];[.D31])" office:value-type="float" office:value="2.5" calcext:value-type="float">
            <text:p>2,5</text:p>
          </table:table-cell>
          <table:table-cell office:value-type="string" calcext:value-type="string">
            <text:p>|</text:p>
          </table:table-cell>
          <table:table-cell table:formula="of:=([.B32]+[.D32])/2" office:value-type="float" office:value="2.34375" calcext:value-type="float">
            <text:p>2,34375</text:p>
          </table:table-cell>
          <table:table-cell office:value-type="string" calcext:value-type="string">
            <text:p>|</text:p>
          </table:table-cell>
          <table:table-cell table:formula="of:=[.F32]*[.F32]" office:value-type="float" office:value="5.4931640625" calcext:value-type="float">
            <text:p>5,493164062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2]&lt;[.$H$26];[.F32];[.B32])" office:value-type="float" office:value="2.1875" calcext:value-type="float">
            <text:p>2,1875</text:p>
          </table:table-cell>
          <table:table-cell office:value-type="string" calcext:value-type="string">
            <text:p>|</text:p>
          </table:table-cell>
          <table:table-cell table:formula="of:=IF([.H32]&gt;[.$H$26];[.F32];[.D32])" office:value-type="float" office:value="2.34375" calcext:value-type="float">
            <text:p>2,34375</text:p>
          </table:table-cell>
          <table:table-cell office:value-type="string" calcext:value-type="string">
            <text:p>|</text:p>
          </table:table-cell>
          <table:table-cell table:formula="of:=([.B33]+[.D33])/2" office:value-type="float" office:value="2.265625" calcext:value-type="float">
            <text:p>2,265625</text:p>
          </table:table-cell>
          <table:table-cell office:value-type="string" calcext:value-type="string">
            <text:p>|</text:p>
          </table:table-cell>
          <table:table-cell table:formula="of:=[.F33]*[.F33]" office:value-type="float" office:value="5.133056640625" calcext:value-type="float">
            <text:p>5,13305664062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3]&lt;[.$H$26];[.F33];[.B33])" office:value-type="float" office:value="2.1875" calcext:value-type="float">
            <text:p>2,1875</text:p>
          </table:table-cell>
          <table:table-cell office:value-type="string" calcext:value-type="string">
            <text:p>|</text:p>
          </table:table-cell>
          <table:table-cell table:formula="of:=IF([.H33]&gt;[.$H$26];[.F33];[.D33])" office:value-type="float" office:value="2.265625" calcext:value-type="float">
            <text:p>2,265625</text:p>
          </table:table-cell>
          <table:table-cell office:value-type="string" calcext:value-type="string">
            <text:p>|</text:p>
          </table:table-cell>
          <table:table-cell table:formula="of:=([.B34]+[.D34])/2" office:value-type="float" office:value="2.2265625" calcext:value-type="float">
            <text:p>2,2265625</text:p>
          </table:table-cell>
          <table:table-cell office:value-type="string" calcext:value-type="string">
            <text:p>|</text:p>
          </table:table-cell>
          <table:table-cell table:formula="of:=[.F34]*[.F34]" office:value-type="float" office:value="4.95758056640625" calcext:value-type="float">
            <text:p>4,9575805664062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4]&lt;[.$H$26];[.F34];[.B34])" office:value-type="float" office:value="2.2265625" calcext:value-type="float">
            <text:p>2,2265625</text:p>
          </table:table-cell>
          <table:table-cell office:value-type="string" calcext:value-type="string">
            <text:p>|</text:p>
          </table:table-cell>
          <table:table-cell table:formula="of:=IF([.H34]&gt;[.$H$26];[.F34];[.D34])" office:value-type="float" office:value="2.265625" calcext:value-type="float">
            <text:p>2,265625</text:p>
          </table:table-cell>
          <table:table-cell office:value-type="string" calcext:value-type="string">
            <text:p>|</text:p>
          </table:table-cell>
          <table:table-cell table:formula="of:=([.B35]+[.D35])/2" office:value-type="float" office:value="2.24609375" calcext:value-type="float">
            <text:p>2,24609375</text:p>
          </table:table-cell>
          <table:table-cell office:value-type="string" calcext:value-type="string">
            <text:p>|</text:p>
          </table:table-cell>
          <table:table-cell table:formula="of:=[.F35]*[.F35]" office:value-type="float" office:value="5.04493713378906" calcext:value-type="float">
            <text:p>5,04493713378906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5]&lt;[.$H$26];[.F35];[.B35])" office:value-type="float" office:value="2.2265625" calcext:value-type="float">
            <text:p>2,2265625</text:p>
          </table:table-cell>
          <table:table-cell office:value-type="string" calcext:value-type="string">
            <text:p>|</text:p>
          </table:table-cell>
          <table:table-cell table:formula="of:=IF([.H35]&gt;[.$H$26];[.F35];[.D35])" office:value-type="float" office:value="2.24609375" calcext:value-type="float">
            <text:p>2,24609375</text:p>
          </table:table-cell>
          <table:table-cell office:value-type="string" calcext:value-type="string">
            <text:p>|</text:p>
          </table:table-cell>
          <table:table-cell table:formula="of:=([.B36]+[.D36])/2" office:value-type="float" office:value="2.236328125" calcext:value-type="float">
            <text:p>2,236328125</text:p>
          </table:table-cell>
          <table:table-cell office:value-type="string" calcext:value-type="string">
            <text:p>|</text:p>
          </table:table-cell>
          <table:table-cell table:formula="of:=[.F36]*[.F36]" office:value-type="float" office:value="5.00116348266602" calcext:value-type="float">
            <text:p>5,0011634826660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6]&lt;[.$H$26];[.F36];[.B36])" office:value-type="float" office:value="2.2265625" calcext:value-type="float">
            <text:p>2,2265625</text:p>
          </table:table-cell>
          <table:table-cell office:value-type="string" calcext:value-type="string">
            <text:p>|</text:p>
          </table:table-cell>
          <table:table-cell table:formula="of:=IF([.H36]&gt;[.$H$26];[.F36];[.D36])" office:value-type="float" office:value="2.236328125" calcext:value-type="float">
            <text:p>2,236328125</text:p>
          </table:table-cell>
          <table:table-cell office:value-type="string" calcext:value-type="string">
            <text:p>|</text:p>
          </table:table-cell>
          <table:table-cell table:formula="of:=([.B37]+[.D37])/2" office:value-type="float" office:value="2.2314453125" calcext:value-type="float">
            <text:p>2,2314453125</text:p>
          </table:table-cell>
          <table:table-cell office:value-type="string" calcext:value-type="string">
            <text:p>|</text:p>
          </table:table-cell>
          <table:table-cell table:formula="of:=[.F37]*[.F37]" office:value-type="float" office:value="4.97934818267822" calcext:value-type="float">
            <text:p>4,9793481826782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7]&lt;[.$H$26];[.F37];[.B37])" office:value-type="float" office:value="2.2314453125" calcext:value-type="float">
            <text:p>2,2314453125</text:p>
          </table:table-cell>
          <table:table-cell office:value-type="string" calcext:value-type="string">
            <text:p>|</text:p>
          </table:table-cell>
          <table:table-cell table:formula="of:=IF([.H37]&gt;[.$H$26];[.F37];[.D37])" office:value-type="float" office:value="2.236328125" calcext:value-type="float">
            <text:p>2,236328125</text:p>
          </table:table-cell>
          <table:table-cell office:value-type="string" calcext:value-type="string">
            <text:p>|</text:p>
          </table:table-cell>
          <table:table-cell table:formula="of:=([.B38]+[.D38])/2" office:value-type="float" office:value="2.23388671875" calcext:value-type="float">
            <text:p>2,23388671875</text:p>
          </table:table-cell>
          <table:table-cell office:value-type="string" calcext:value-type="string">
            <text:p>|</text:p>
          </table:table-cell>
          <table:table-cell table:formula="of:=[.F38]*[.F38]" office:value-type="float" office:value="4.99024987220764" calcext:value-type="float">
            <text:p>4,99024987220764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8]&lt;[.$H$26];[.F38];[.B38])" office:value-type="float" office:value="2.23388671875" calcext:value-type="float">
            <text:p>2,23388671875</text:p>
          </table:table-cell>
          <table:table-cell office:value-type="string" calcext:value-type="string">
            <text:p>|</text:p>
          </table:table-cell>
          <table:table-cell table:formula="of:=IF([.H38]&gt;[.$H$26];[.F38];[.D38])" office:value-type="float" office:value="2.236328125" calcext:value-type="float">
            <text:p>2,236328125</text:p>
          </table:table-cell>
          <table:table-cell office:value-type="string" calcext:value-type="string">
            <text:p>|</text:p>
          </table:table-cell>
          <table:table-cell table:formula="of:=([.B39]+[.D39])/2" office:value-type="float" office:value="2.235107421875" calcext:value-type="float">
            <text:p>2,235107421875</text:p>
          </table:table-cell>
          <table:table-cell office:value-type="string" calcext:value-type="string">
            <text:p>|</text:p>
          </table:table-cell>
          <table:table-cell table:formula="of:=[.F39]*[.F39]" office:value-type="float" office:value="4.99570518732071" calcext:value-type="float">
            <text:p>4,9957051873207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39]&lt;[.$H$26];[.F39];[.B39])" office:value-type="float" office:value="2.235107421875" calcext:value-type="float">
            <text:p>2,235107421875</text:p>
          </table:table-cell>
          <table:table-cell office:value-type="string" calcext:value-type="string">
            <text:p>|</text:p>
          </table:table-cell>
          <table:table-cell table:formula="of:=IF([.H39]&gt;[.$H$26];[.F39];[.D39])" office:value-type="float" office:value="2.236328125" calcext:value-type="float">
            <text:p>2,236328125</text:p>
          </table:table-cell>
          <table:table-cell office:value-type="string" calcext:value-type="string">
            <text:p>|</text:p>
          </table:table-cell>
          <table:table-cell table:formula="of:=([.B40]+[.D40])/2" office:value-type="float" office:value="2.2357177734375" calcext:value-type="float">
            <text:p>2,2357177734375</text:p>
          </table:table-cell>
          <table:table-cell office:value-type="string" calcext:value-type="string">
            <text:p>|</text:p>
          </table:table-cell>
          <table:table-cell table:formula="of:=[.F40]*[.F40]" office:value-type="float" office:value="4.99843396246433" calcext:value-type="float">
            <text:p>4,9984339624643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0]&lt;[.$H$26];[.F40];[.B40])" office:value-type="float" office:value="2.2357177734375" calcext:value-type="float">
            <text:p>2,2357177734375</text:p>
          </table:table-cell>
          <table:table-cell office:value-type="string" calcext:value-type="string">
            <text:p>|</text:p>
          </table:table-cell>
          <table:table-cell table:formula="of:=IF([.H40]&gt;[.$H$26];[.F40];[.D40])" office:value-type="float" office:value="2.236328125" calcext:value-type="float">
            <text:p>2,236328125</text:p>
          </table:table-cell>
          <table:table-cell office:value-type="string" calcext:value-type="string">
            <text:p>|</text:p>
          </table:table-cell>
          <table:table-cell table:formula="of:=([.B41]+[.D41])/2" office:value-type="float" office:value="2.23602294921875" calcext:value-type="float">
            <text:p>2,23602294921875</text:p>
          </table:table-cell>
          <table:table-cell office:value-type="string" calcext:value-type="string">
            <text:p>|</text:p>
          </table:table-cell>
          <table:table-cell table:formula="of:=[.F41]*[.F41]" office:value-type="float" office:value="4.99979862943292" calcext:value-type="float">
            <text:p>4,9997986294329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1]&lt;[.$H$26];[.F41];[.B41])" office:value-type="float" office:value="2.23602294921875" calcext:value-type="float">
            <text:p>2,23602294921875</text:p>
          </table:table-cell>
          <table:table-cell office:value-type="string" calcext:value-type="string">
            <text:p>|</text:p>
          </table:table-cell>
          <table:table-cell table:formula="of:=IF([.H41]&gt;[.$H$26];[.F41];[.D41])" office:value-type="float" office:value="2.236328125" calcext:value-type="float">
            <text:p>2,236328125</text:p>
          </table:table-cell>
          <table:table-cell office:value-type="string" calcext:value-type="string">
            <text:p>|</text:p>
          </table:table-cell>
          <table:table-cell table:formula="of:=([.B42]+[.D42])/2" office:value-type="float" office:value="2.23617553710937" calcext:value-type="float">
            <text:p>2,23617553710937</text:p>
          </table:table-cell>
          <table:table-cell office:value-type="string" calcext:value-type="string">
            <text:p>|</text:p>
          </table:table-cell>
          <table:table-cell table:formula="of:=[.F42]*[.F42]" office:value-type="float" office:value="5.0004810327664" calcext:value-type="float">
            <text:p>5,0004810327664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2]&lt;[.$H$26];[.F42];[.B42])" office:value-type="float" office:value="2.23602294921875" calcext:value-type="float">
            <text:p>2,23602294921875</text:p>
          </table:table-cell>
          <table:table-cell office:value-type="string" calcext:value-type="string">
            <text:p>|</text:p>
          </table:table-cell>
          <table:table-cell table:formula="of:=IF([.H42]&gt;[.$H$26];[.F42];[.D42])" office:value-type="float" office:value="2.23617553710937" calcext:value-type="float">
            <text:p>2,23617553710937</text:p>
          </table:table-cell>
          <table:table-cell office:value-type="string" calcext:value-type="string">
            <text:p>|</text:p>
          </table:table-cell>
          <table:table-cell table:formula="of:=([.B43]+[.D43])/2" office:value-type="float" office:value="2.23609924316406" calcext:value-type="float">
            <text:p>2,23609924316406</text:p>
          </table:table-cell>
          <table:table-cell office:value-type="string" calcext:value-type="string">
            <text:p>|</text:p>
          </table:table-cell>
          <table:table-cell table:formula="of:=[.F43]*[.F43]" office:value-type="float" office:value="5.00013982527889" calcext:value-type="float">
            <text:p>5,00013982527889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3]&lt;[.$H$26];[.F43];[.B43])" office:value-type="float" office:value="2.23602294921875" calcext:value-type="float">
            <text:p>2,23602294921875</text:p>
          </table:table-cell>
          <table:table-cell office:value-type="string" calcext:value-type="string">
            <text:p>|</text:p>
          </table:table-cell>
          <table:table-cell table:formula="of:=IF([.H43]&gt;[.$H$26];[.F43];[.D43])" office:value-type="float" office:value="2.23609924316406" calcext:value-type="float">
            <text:p>2,23609924316406</text:p>
          </table:table-cell>
          <table:table-cell office:value-type="string" calcext:value-type="string">
            <text:p>|</text:p>
          </table:table-cell>
          <table:table-cell table:formula="of:=([.B44]+[.D44])/2" office:value-type="float" office:value="2.23606109619141" calcext:value-type="float">
            <text:p>2,23606109619141</text:p>
          </table:table-cell>
          <table:table-cell office:value-type="string" calcext:value-type="string">
            <text:p>|</text:p>
          </table:table-cell>
          <table:table-cell table:formula="of:=[.F44]*[.F44]" office:value-type="float" office:value="4.99996922590071" calcext:value-type="float">
            <text:p>4,9999692259007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4]&lt;[.$H$26];[.F44];[.B44])" office:value-type="float" office:value="2.23606109619141" calcext:value-type="float">
            <text:p>2,23606109619141</text:p>
          </table:table-cell>
          <table:table-cell office:value-type="string" calcext:value-type="string">
            <text:p>|</text:p>
          </table:table-cell>
          <table:table-cell table:formula="of:=IF([.H44]&gt;[.$H$26];[.F44];[.D44])" office:value-type="float" office:value="2.23609924316406" calcext:value-type="float">
            <text:p>2,23609924316406</text:p>
          </table:table-cell>
          <table:table-cell office:value-type="string" calcext:value-type="string">
            <text:p>|</text:p>
          </table:table-cell>
          <table:table-cell table:formula="of:=([.B45]+[.D45])/2" office:value-type="float" office:value="2.23608016967773" calcext:value-type="float">
            <text:p>2,23608016967773</text:p>
          </table:table-cell>
          <table:table-cell office:value-type="string" calcext:value-type="string">
            <text:p>|</text:p>
          </table:table-cell>
          <table:table-cell table:formula="of:=[.F45]*[.F45]" office:value-type="float" office:value="5.00005452522601" calcext:value-type="float">
            <text:p>5,000054525226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5]&lt;[.$H$26];[.F45];[.B45])" office:value-type="float" office:value="2.23606109619141" calcext:value-type="float">
            <text:p>2,23606109619141</text:p>
          </table:table-cell>
          <table:table-cell office:value-type="string" calcext:value-type="string">
            <text:p>|</text:p>
          </table:table-cell>
          <table:table-cell table:formula="of:=IF([.H45]&gt;[.$H$26];[.F45];[.D45])" office:value-type="float" office:value="2.23608016967773" calcext:value-type="float">
            <text:p>2,23608016967773</text:p>
          </table:table-cell>
          <table:table-cell office:value-type="string" calcext:value-type="string">
            <text:p>|</text:p>
          </table:table-cell>
          <table:table-cell table:formula="of:=([.B46]+[.D46])/2" office:value-type="float" office:value="2.23607063293457" calcext:value-type="float">
            <text:p>2,23607063293457</text:p>
          </table:table-cell>
          <table:table-cell office:value-type="string" calcext:value-type="string">
            <text:p>|</text:p>
          </table:table-cell>
          <table:table-cell table:formula="of:=[.F46]*[.F46]" office:value-type="float" office:value="5.00001187547241" calcext:value-type="float">
            <text:p>5,0000118754724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6]&lt;[.$H$26];[.F46];[.B46])" office:value-type="float" office:value="2.23606109619141" calcext:value-type="float">
            <text:p>2,23606109619141</text:p>
          </table:table-cell>
          <table:table-cell office:value-type="string" calcext:value-type="string">
            <text:p>|</text:p>
          </table:table-cell>
          <table:table-cell table:formula="of:=IF([.H46]&gt;[.$H$26];[.F46];[.D46])" office:value-type="float" office:value="2.23607063293457" calcext:value-type="float">
            <text:p>2,23607063293457</text:p>
          </table:table-cell>
          <table:table-cell office:value-type="string" calcext:value-type="string">
            <text:p>|</text:p>
          </table:table-cell>
          <table:table-cell table:formula="of:=([.B47]+[.D47])/2" office:value-type="float" office:value="2.23606586456299" calcext:value-type="float">
            <text:p>2,23606586456299</text:p>
          </table:table-cell>
          <table:table-cell office:value-type="string" calcext:value-type="string">
            <text:p>|</text:p>
          </table:table-cell>
          <table:table-cell table:formula="of:=[.F47]*[.F47]" office:value-type="float" office:value="4.99999055066382" calcext:value-type="float">
            <text:p>4,9999905506638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7]&lt;[.$H$26];[.F47];[.B47])" office:value-type="float" office:value="2.23606586456299" calcext:value-type="float">
            <text:p>2,23606586456299</text:p>
          </table:table-cell>
          <table:table-cell office:value-type="string" calcext:value-type="string">
            <text:p>|</text:p>
          </table:table-cell>
          <table:table-cell table:formula="of:=IF([.H47]&gt;[.$H$26];[.F47];[.D47])" office:value-type="float" office:value="2.23607063293457" calcext:value-type="float">
            <text:p>2,23607063293457</text:p>
          </table:table-cell>
          <table:table-cell office:value-type="string" calcext:value-type="string">
            <text:p>|</text:p>
          </table:table-cell>
          <table:table-cell table:formula="of:=([.B48]+[.D48])/2" office:value-type="float" office:value="2.23606824874878" calcext:value-type="float">
            <text:p>2,23606824874878</text:p>
          </table:table-cell>
          <table:table-cell office:value-type="string" calcext:value-type="string">
            <text:p>|</text:p>
          </table:table-cell>
          <table:table-cell table:formula="of:=[.F48]*[.F48]" office:value-type="float" office:value="5.00000121306243" calcext:value-type="float">
            <text:p>5,0000012130624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8]&lt;[.$H$26];[.F48];[.B48])" office:value-type="float" office:value="2.23606586456299" calcext:value-type="float">
            <text:p>2,23606586456299</text:p>
          </table:table-cell>
          <table:table-cell office:value-type="string" calcext:value-type="string">
            <text:p>|</text:p>
          </table:table-cell>
          <table:table-cell table:formula="of:=IF([.H48]&gt;[.$H$26];[.F48];[.D48])" office:value-type="float" office:value="2.23606824874878" calcext:value-type="float">
            <text:p>2,23606824874878</text:p>
          </table:table-cell>
          <table:table-cell office:value-type="string" calcext:value-type="string">
            <text:p>|</text:p>
          </table:table-cell>
          <table:table-cell table:formula="of:=([.B49]+[.D49])/2" office:value-type="float" office:value="2.23606705665588" calcext:value-type="float">
            <text:p>2,23606705665588</text:p>
          </table:table-cell>
          <table:table-cell office:value-type="string" calcext:value-type="string">
            <text:p>|</text:p>
          </table:table-cell>
          <table:table-cell table:formula="of:=[.F49]*[.F49]" office:value-type="float" office:value="4.99999588186171" calcext:value-type="float">
            <text:p>4,9999958818617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49]&lt;[.$H$26];[.F49];[.B49])" office:value-type="float" office:value="2.23606705665588" calcext:value-type="float">
            <text:p>2,23606705665588</text:p>
          </table:table-cell>
          <table:table-cell office:value-type="string" calcext:value-type="string">
            <text:p>|</text:p>
          </table:table-cell>
          <table:table-cell table:formula="of:=IF([.H49]&gt;[.$H$26];[.F49];[.D49])" office:value-type="float" office:value="2.23606824874878" calcext:value-type="float">
            <text:p>2,23606824874878</text:p>
          </table:table-cell>
          <table:table-cell office:value-type="string" calcext:value-type="string">
            <text:p>|</text:p>
          </table:table-cell>
          <table:table-cell table:formula="of:=([.B50]+[.D50])/2" office:value-type="float" office:value="2.23606765270233" calcext:value-type="float">
            <text:p>2,23606765270233</text:p>
          </table:table-cell>
          <table:table-cell office:value-type="string" calcext:value-type="string">
            <text:p>|</text:p>
          </table:table-cell>
          <table:table-cell table:formula="of:=[.F50]*[.F50]" office:value-type="float" office:value="4.99999854746172" calcext:value-type="float">
            <text:p>4,9999985474617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0]&lt;[.$H$26];[.F50];[.B50])" office:value-type="float" office:value="2.23606765270233" calcext:value-type="float">
            <text:p>2,23606765270233</text:p>
          </table:table-cell>
          <table:table-cell office:value-type="string" calcext:value-type="string">
            <text:p>|</text:p>
          </table:table-cell>
          <table:table-cell table:formula="of:=IF([.H50]&gt;[.$H$26];[.F50];[.D50])" office:value-type="float" office:value="2.23606824874878" calcext:value-type="float">
            <text:p>2,23606824874878</text:p>
          </table:table-cell>
          <table:table-cell office:value-type="string" calcext:value-type="string">
            <text:p>|</text:p>
          </table:table-cell>
          <table:table-cell table:formula="of:=([.B51]+[.D51])/2" office:value-type="float" office:value="2.23606795072556" calcext:value-type="float">
            <text:p>2,23606795072556</text:p>
          </table:table-cell>
          <table:table-cell office:value-type="string" calcext:value-type="string">
            <text:p>|</text:p>
          </table:table-cell>
          <table:table-cell table:formula="of:=[.F51]*[.F51]" office:value-type="float" office:value="4.99999988026199" calcext:value-type="float">
            <text:p>4,99999988026199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1]&lt;[.$H$26];[.F51];[.B51])" office:value-type="float" office:value="2.23606795072556" calcext:value-type="float">
            <text:p>2,23606795072556</text:p>
          </table:table-cell>
          <table:table-cell office:value-type="string" calcext:value-type="string">
            <text:p>|</text:p>
          </table:table-cell>
          <table:table-cell table:formula="of:=IF([.H51]&gt;[.$H$26];[.F51];[.D51])" office:value-type="float" office:value="2.23606824874878" calcext:value-type="float">
            <text:p>2,23606824874878</text:p>
          </table:table-cell>
          <table:table-cell office:value-type="string" calcext:value-type="string">
            <text:p>|</text:p>
          </table:table-cell>
          <table:table-cell table:formula="of:=([.B52]+[.D52])/2" office:value-type="float" office:value="2.23606809973717" calcext:value-type="float">
            <text:p>2,23606809973717</text:p>
          </table:table-cell>
          <table:table-cell office:value-type="string" calcext:value-type="string">
            <text:p>|</text:p>
          </table:table-cell>
          <table:table-cell table:formula="of:=[.F52]*[.F52]" office:value-type="float" office:value="5.00000054666219" calcext:value-type="float">
            <text:p>5,00000054666219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2]&lt;[.$H$26];[.F52];[.B52])" office:value-type="float" office:value="2.23606795072556" calcext:value-type="float">
            <text:p>2,23606795072556</text:p>
          </table:table-cell>
          <table:table-cell office:value-type="string" calcext:value-type="string">
            <text:p>|</text:p>
          </table:table-cell>
          <table:table-cell table:formula="of:=IF([.H52]&gt;[.$H$26];[.F52];[.D52])" office:value-type="float" office:value="2.23606809973717" calcext:value-type="float">
            <text:p>2,23606809973717</text:p>
          </table:table-cell>
          <table:table-cell office:value-type="string" calcext:value-type="string">
            <text:p>|</text:p>
          </table:table-cell>
          <table:table-cell table:formula="of:=([.B53]+[.D53])/2" office:value-type="float" office:value="2.23606802523136" calcext:value-type="float">
            <text:p>2,23606802523136</text:p>
          </table:table-cell>
          <table:table-cell office:value-type="string" calcext:value-type="string">
            <text:p>|</text:p>
          </table:table-cell>
          <table:table-cell table:formula="of:=[.F53]*[.F53]" office:value-type="float" office:value="5.00000021346208" calcext:value-type="float">
            <text:p>5,00000021346208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3]&lt;[.$H$26];[.F53];[.B53])" office:value-type="float" office:value="2.23606795072556" calcext:value-type="float">
            <text:p>2,23606795072556</text:p>
          </table:table-cell>
          <table:table-cell office:value-type="string" calcext:value-type="string">
            <text:p>|</text:p>
          </table:table-cell>
          <table:table-cell table:formula="of:=IF([.H53]&gt;[.$H$26];[.F53];[.D53])" office:value-type="float" office:value="2.23606802523136" calcext:value-type="float">
            <text:p>2,23606802523136</text:p>
          </table:table-cell>
          <table:table-cell office:value-type="string" calcext:value-type="string">
            <text:p>|</text:p>
          </table:table-cell>
          <table:table-cell table:formula="of:=([.B54]+[.D54])/2" office:value-type="float" office:value="2.23606798797846" calcext:value-type="float">
            <text:p>2,23606798797846</text:p>
          </table:table-cell>
          <table:table-cell office:value-type="string" calcext:value-type="string">
            <text:p>|</text:p>
          </table:table-cell>
          <table:table-cell table:formula="of:=[.F54]*[.F54]" office:value-type="float" office:value="5.00000004686203" calcext:value-type="float">
            <text:p>5,0000000468620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4]&lt;[.$H$26];[.F54];[.B54])" office:value-type="float" office:value="2.23606795072556" calcext:value-type="float">
            <text:p>2,23606795072556</text:p>
          </table:table-cell>
          <table:table-cell office:value-type="string" calcext:value-type="string">
            <text:p>|</text:p>
          </table:table-cell>
          <table:table-cell table:formula="of:=IF([.H54]&gt;[.$H$26];[.F54];[.D54])" office:value-type="float" office:value="2.23606798797846" calcext:value-type="float">
            <text:p>2,23606798797846</text:p>
          </table:table-cell>
          <table:table-cell office:value-type="string" calcext:value-type="string">
            <text:p>|</text:p>
          </table:table-cell>
          <table:table-cell table:formula="of:=([.B55]+[.D55])/2" office:value-type="float" office:value="2.23606796935201" calcext:value-type="float">
            <text:p>2,23606796935201</text:p>
          </table:table-cell>
          <table:table-cell office:value-type="string" calcext:value-type="string">
            <text:p>|</text:p>
          </table:table-cell>
          <table:table-cell table:formula="of:=[.F55]*[.F55]" office:value-type="float" office:value="4.99999996356201" calcext:value-type="float">
            <text:p>4,999999963562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5]&lt;[.$H$26];[.F55];[.B55])" office:value-type="float" office:value="2.23606796935201" calcext:value-type="float">
            <text:p>2,23606796935201</text:p>
          </table:table-cell>
          <table:table-cell office:value-type="string" calcext:value-type="string">
            <text:p>|</text:p>
          </table:table-cell>
          <table:table-cell table:formula="of:=IF([.H55]&gt;[.$H$26];[.F55];[.D55])" office:value-type="float" office:value="2.23606798797846" calcext:value-type="float">
            <text:p>2,23606798797846</text:p>
          </table:table-cell>
          <table:table-cell office:value-type="string" calcext:value-type="string">
            <text:p>|</text:p>
          </table:table-cell>
          <table:table-cell table:formula="of:=([.B56]+[.D56])/2" office:value-type="float" office:value="2.23606797866523" calcext:value-type="float">
            <text:p>2,23606797866523</text:p>
          </table:table-cell>
          <table:table-cell office:value-type="string" calcext:value-type="string">
            <text:p>|</text:p>
          </table:table-cell>
          <table:table-cell table:formula="of:=[.F56]*[.F56]" office:value-type="float" office:value="5.00000000521202" calcext:value-type="float">
            <text:p>5,0000000052120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6]&lt;[.$H$26];[.F56];[.B56])" office:value-type="float" office:value="2.23606796935201" calcext:value-type="float">
            <text:p>2,23606796935201</text:p>
          </table:table-cell>
          <table:table-cell office:value-type="string" calcext:value-type="string">
            <text:p>|</text:p>
          </table:table-cell>
          <table:table-cell table:formula="of:=IF([.H56]&gt;[.$H$26];[.F56];[.D56])" office:value-type="float" office:value="2.23606797866523" calcext:value-type="float">
            <text:p>2,23606797866523</text:p>
          </table:table-cell>
          <table:table-cell office:value-type="string" calcext:value-type="string">
            <text:p>|</text:p>
          </table:table-cell>
          <table:table-cell table:formula="of:=([.B57]+[.D57])/2" office:value-type="float" office:value="2.23606797400862" calcext:value-type="float">
            <text:p>2,23606797400862</text:p>
          </table:table-cell>
          <table:table-cell office:value-type="string" calcext:value-type="string">
            <text:p>|</text:p>
          </table:table-cell>
          <table:table-cell table:formula="of:=[.F57]*[.F57]" office:value-type="float" office:value="4.99999998438701" calcext:value-type="float">
            <text:p>4,999999984387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7]&lt;[.$H$26];[.F57];[.B57])" office:value-type="float" office:value="2.23606797400862" calcext:value-type="float">
            <text:p>2,23606797400862</text:p>
          </table:table-cell>
          <table:table-cell office:value-type="string" calcext:value-type="string">
            <text:p>|</text:p>
          </table:table-cell>
          <table:table-cell table:formula="of:=IF([.H57]&gt;[.$H$26];[.F57];[.D57])" office:value-type="float" office:value="2.23606797866523" calcext:value-type="float">
            <text:p>2,23606797866523</text:p>
          </table:table-cell>
          <table:table-cell office:value-type="string" calcext:value-type="string">
            <text:p>|</text:p>
          </table:table-cell>
          <table:table-cell table:formula="of:=([.B58]+[.D58])/2" office:value-type="float" office:value="2.23606797633693" calcext:value-type="float">
            <text:p>2,23606797633693</text:p>
          </table:table-cell>
          <table:table-cell office:value-type="string" calcext:value-type="string">
            <text:p>|</text:p>
          </table:table-cell>
          <table:table-cell table:formula="of:=[.F58]*[.F58]" office:value-type="float" office:value="4.99999999479952" calcext:value-type="float">
            <text:p>4,9999999947995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8]&lt;[.$H$26];[.F58];[.B58])" office:value-type="float" office:value="2.23606797633693" calcext:value-type="float">
            <text:p>2,23606797633693</text:p>
          </table:table-cell>
          <table:table-cell office:value-type="string" calcext:value-type="string">
            <text:p>|</text:p>
          </table:table-cell>
          <table:table-cell table:formula="of:=IF([.H58]&gt;[.$H$26];[.F58];[.D58])" office:value-type="float" office:value="2.23606797866523" calcext:value-type="float">
            <text:p>2,23606797866523</text:p>
          </table:table-cell>
          <table:table-cell office:value-type="string" calcext:value-type="string">
            <text:p>|</text:p>
          </table:table-cell>
          <table:table-cell table:formula="of:=([.B59]+[.D59])/2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[.F59]*[.F59]" office:value-type="float" office:value="5.00000000000577" calcext:value-type="float">
            <text:p>5,00000000000577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59]&lt;[.$H$26];[.F59];[.B59])" office:value-type="float" office:value="2.23606797633693" calcext:value-type="float">
            <text:p>2,23606797633693</text:p>
          </table:table-cell>
          <table:table-cell office:value-type="string" calcext:value-type="string">
            <text:p>|</text:p>
          </table:table-cell>
          <table:table-cell table:formula="of:=IF([.H59]&gt;[.$H$26];[.F59];[.D59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0]+[.D60])/2" office:value-type="float" office:value="2.236067976919" calcext:value-type="float">
            <text:p>2,236067976919</text:p>
          </table:table-cell>
          <table:table-cell office:value-type="string" calcext:value-type="string">
            <text:p>|</text:p>
          </table:table-cell>
          <table:table-cell table:formula="of:=[.F60]*[.F60]" office:value-type="float" office:value="4.99999999740264" calcext:value-type="float">
            <text:p>4,99999999740264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0]&lt;[.$H$26];[.F60];[.B60])" office:value-type="float" office:value="2.236067976919" calcext:value-type="float">
            <text:p>2,236067976919</text:p>
          </table:table-cell>
          <table:table-cell office:value-type="string" calcext:value-type="string">
            <text:p>|</text:p>
          </table:table-cell>
          <table:table-cell table:formula="of:=IF([.H60]&gt;[.$H$26];[.F60];[.D60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1]+[.D61])/2" office:value-type="float" office:value="2.23606797721004" calcext:value-type="float">
            <text:p>2,23606797721004</text:p>
          </table:table-cell>
          <table:table-cell office:value-type="string" calcext:value-type="string">
            <text:p>|</text:p>
          </table:table-cell>
          <table:table-cell table:formula="of:=[.F61]*[.F61]" office:value-type="float" office:value="4.99999999870421" calcext:value-type="float">
            <text:p>4,9999999987042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1]&lt;[.$H$26];[.F61];[.B61])" office:value-type="float" office:value="2.23606797721004" calcext:value-type="float">
            <text:p>2,23606797721004</text:p>
          </table:table-cell>
          <table:table-cell office:value-type="string" calcext:value-type="string">
            <text:p>|</text:p>
          </table:table-cell>
          <table:table-cell table:formula="of:=IF([.H61]&gt;[.$H$26];[.F61];[.D61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2]+[.D62])/2" office:value-type="float" office:value="2.23606797735556" calcext:value-type="float">
            <text:p>2,23606797735556</text:p>
          </table:table-cell>
          <table:table-cell office:value-type="string" calcext:value-type="string">
            <text:p>|</text:p>
          </table:table-cell>
          <table:table-cell table:formula="of:=[.F62]*[.F62]" office:value-type="float" office:value="4.99999999935499" calcext:value-type="float">
            <text:p>4,99999999935499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2]&lt;[.$H$26];[.F62];[.B62])" office:value-type="float" office:value="2.23606797735556" calcext:value-type="float">
            <text:p>2,23606797735556</text:p>
          </table:table-cell>
          <table:table-cell office:value-type="string" calcext:value-type="string">
            <text:p>|</text:p>
          </table:table-cell>
          <table:table-cell table:formula="of:=IF([.H62]&gt;[.$H$26];[.F62];[.D62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3]+[.D63])/2" office:value-type="float" office:value="2.23606797742832" calcext:value-type="float">
            <text:p>2,23606797742832</text:p>
          </table:table-cell>
          <table:table-cell office:value-type="string" calcext:value-type="string">
            <text:p>|</text:p>
          </table:table-cell>
          <table:table-cell table:formula="of:=[.F63]*[.F63]" office:value-type="float" office:value="4.99999999968038" calcext:value-type="float">
            <text:p>4,99999999968038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3]&lt;[.$H$26];[.F63];[.B63])" office:value-type="float" office:value="2.23606797742832" calcext:value-type="float">
            <text:p>2,23606797742832</text:p>
          </table:table-cell>
          <table:table-cell office:value-type="string" calcext:value-type="string">
            <text:p>|</text:p>
          </table:table-cell>
          <table:table-cell table:formula="of:=IF([.H63]&gt;[.$H$26];[.F63];[.D63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4]+[.D64])/2" office:value-type="float" office:value="2.2360679774647" calcext:value-type="float">
            <text:p>2,2360679774647</text:p>
          </table:table-cell>
          <table:table-cell office:value-type="string" calcext:value-type="string">
            <text:p>|</text:p>
          </table:table-cell>
          <table:table-cell table:formula="of:=[.F64]*[.F64]" office:value-type="float" office:value="4.99999999984307" calcext:value-type="float">
            <text:p>4,99999999984307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4]&lt;[.$H$26];[.F64];[.B64])" office:value-type="float" office:value="2.2360679774647" calcext:value-type="float">
            <text:p>2,2360679774647</text:p>
          </table:table-cell>
          <table:table-cell office:value-type="string" calcext:value-type="string">
            <text:p>|</text:p>
          </table:table-cell>
          <table:table-cell table:formula="of:=IF([.H64]&gt;[.$H$26];[.F64];[.D64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5]+[.D65])/2" office:value-type="float" office:value="2.23606797748289" calcext:value-type="float">
            <text:p>2,23606797748289</text:p>
          </table:table-cell>
          <table:table-cell office:value-type="string" calcext:value-type="string">
            <text:p>|</text:p>
          </table:table-cell>
          <table:table-cell table:formula="of:=[.F65]*[.F65]" office:value-type="float" office:value="4.99999999992442" calcext:value-type="float">
            <text:p>4,9999999999244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5]&lt;[.$H$26];[.F65];[.B65])" office:value-type="float" office:value="2.23606797748289" calcext:value-type="float">
            <text:p>2,23606797748289</text:p>
          </table:table-cell>
          <table:table-cell office:value-type="string" calcext:value-type="string">
            <text:p>|</text:p>
          </table:table-cell>
          <table:table-cell table:formula="of:=IF([.H65]&gt;[.$H$26];[.F65];[.D65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6]+[.D66])/2" office:value-type="float" office:value="2.23606797749198" calcext:value-type="float">
            <text:p>2,23606797749198</text:p>
          </table:table-cell>
          <table:table-cell office:value-type="string" calcext:value-type="string">
            <text:p>|</text:p>
          </table:table-cell>
          <table:table-cell table:formula="of:=[.F66]*[.F66]" office:value-type="float" office:value="4.99999999996509" calcext:value-type="float">
            <text:p>4,99999999996509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6]&lt;[.$H$26];[.F66];[.B66])" office:value-type="float" office:value="2.23606797749198" calcext:value-type="float">
            <text:p>2,23606797749198</text:p>
          </table:table-cell>
          <table:table-cell office:value-type="string" calcext:value-type="string">
            <text:p>|</text:p>
          </table:table-cell>
          <table:table-cell table:formula="of:=IF([.H66]&gt;[.$H$26];[.F66];[.D66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7]+[.D67])/2" office:value-type="float" office:value="2.23606797749653" calcext:value-type="float">
            <text:p>2,23606797749653</text:p>
          </table:table-cell>
          <table:table-cell office:value-type="string" calcext:value-type="string">
            <text:p>|</text:p>
          </table:table-cell>
          <table:table-cell table:formula="of:=[.F67]*[.F67]" office:value-type="float" office:value="4.99999999998543" calcext:value-type="float">
            <text:p>4,9999999999854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7]&lt;[.$H$26];[.F67];[.B67])" office:value-type="float" office:value="2.23606797749653" calcext:value-type="float">
            <text:p>2,23606797749653</text:p>
          </table:table-cell>
          <table:table-cell office:value-type="string" calcext:value-type="string">
            <text:p>|</text:p>
          </table:table-cell>
          <table:table-cell table:formula="of:=IF([.H67]&gt;[.$H$26];[.F67];[.D67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8]+[.D68])/2" office:value-type="float" office:value="2.23606797749881" calcext:value-type="float">
            <text:p>2,23606797749881</text:p>
          </table:table-cell>
          <table:table-cell office:value-type="string" calcext:value-type="string">
            <text:p>|</text:p>
          </table:table-cell>
          <table:table-cell table:formula="of:=[.F68]*[.F68]" office:value-type="float" office:value="4.9999999999956" calcext:value-type="float">
            <text:p>4,9999999999956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8]&lt;[.$H$26];[.F68];[.B68])" office:value-type="float" office:value="2.23606797749881" calcext:value-type="float">
            <text:p>2,23606797749881</text:p>
          </table:table-cell>
          <table:table-cell office:value-type="string" calcext:value-type="string">
            <text:p>|</text:p>
          </table:table-cell>
          <table:table-cell table:formula="of:=IF([.H68]&gt;[.$H$26];[.F68];[.D68])" office:value-type="float" office:value="2.23606797750108" calcext:value-type="float">
            <text:p>2,23606797750108</text:p>
          </table:table-cell>
          <table:table-cell office:value-type="string" calcext:value-type="string">
            <text:p>|</text:p>
          </table:table-cell>
          <table:table-cell table:formula="of:=([.B69]+[.D69])/2" office:value-type="float" office:value="2.23606797749994" calcext:value-type="float">
            <text:p>2,23606797749994</text:p>
          </table:table-cell>
          <table:table-cell office:value-type="string" calcext:value-type="string">
            <text:p>|</text:p>
          </table:table-cell>
          <table:table-cell table:formula="of:=[.F69]*[.F69]" office:value-type="float" office:value="5.00000000000068" calcext:value-type="float">
            <text:p>5,00000000000068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69]&lt;[.$H$26];[.F69];[.B69])" office:value-type="float" office:value="2.23606797749881" calcext:value-type="float">
            <text:p>2,23606797749881</text:p>
          </table:table-cell>
          <table:table-cell office:value-type="string" calcext:value-type="string">
            <text:p>|</text:p>
          </table:table-cell>
          <table:table-cell table:formula="of:=IF([.H69]&gt;[.$H$26];[.F69];[.D69])" office:value-type="float" office:value="2.23606797749994" calcext:value-type="float">
            <text:p>2,23606797749994</text:p>
          </table:table-cell>
          <table:table-cell office:value-type="string" calcext:value-type="string">
            <text:p>|</text:p>
          </table:table-cell>
          <table:table-cell table:formula="of:=([.B70]+[.D70])/2" office:value-type="float" office:value="2.23606797749937" calcext:value-type="float">
            <text:p>2,23606797749937</text:p>
          </table:table-cell>
          <table:table-cell office:value-type="string" calcext:value-type="string">
            <text:p>|</text:p>
          </table:table-cell>
          <table:table-cell table:formula="of:=[.F70]*[.F70]" office:value-type="float" office:value="4.99999999999814" calcext:value-type="float">
            <text:p>4,99999999999814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0]&lt;[.$H$26];[.F70];[.B70])" office:value-type="float" office:value="2.23606797749937" calcext:value-type="float">
            <text:p>2,23606797749937</text:p>
          </table:table-cell>
          <table:table-cell office:value-type="string" calcext:value-type="string">
            <text:p>|</text:p>
          </table:table-cell>
          <table:table-cell table:formula="of:=IF([.H70]&gt;[.$H$26];[.F70];[.D70])" office:value-type="float" office:value="2.23606797749994" calcext:value-type="float">
            <text:p>2,23606797749994</text:p>
          </table:table-cell>
          <table:table-cell office:value-type="string" calcext:value-type="string">
            <text:p>|</text:p>
          </table:table-cell>
          <table:table-cell table:formula="of:=([.B71]+[.D71])/2" office:value-type="float" office:value="2.23606797749966" calcext:value-type="float">
            <text:p>2,23606797749966</text:p>
          </table:table-cell>
          <table:table-cell office:value-type="string" calcext:value-type="string">
            <text:p>|</text:p>
          </table:table-cell>
          <table:table-cell table:formula="of:=[.F71]*[.F71]" office:value-type="float" office:value="4.99999999999941" calcext:value-type="float">
            <text:p>4,9999999999994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1]&lt;[.$H$26];[.F71];[.B71])" office:value-type="float" office:value="2.23606797749966" calcext:value-type="float">
            <text:p>2,23606797749966</text:p>
          </table:table-cell>
          <table:table-cell office:value-type="string" calcext:value-type="string">
            <text:p>|</text:p>
          </table:table-cell>
          <table:table-cell table:formula="of:=IF([.H71]&gt;[.$H$26];[.F71];[.D71])" office:value-type="float" office:value="2.23606797749994" calcext:value-type="float">
            <text:p>2,23606797749994</text:p>
          </table:table-cell>
          <table:table-cell office:value-type="string" calcext:value-type="string">
            <text:p>|</text:p>
          </table:table-cell>
          <table:table-cell table:formula="of:=([.B72]+[.D72])/2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[.F72]*[.F72]" office:value-type="float" office:value="5.00000000000005" calcext:value-type="float">
            <text:p>5,0000000000000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2]&lt;[.$H$26];[.F72];[.B72])" office:value-type="float" office:value="2.23606797749966" calcext:value-type="float">
            <text:p>2,23606797749966</text:p>
          </table:table-cell>
          <table:table-cell office:value-type="string" calcext:value-type="string">
            <text:p>|</text:p>
          </table:table-cell>
          <table:table-cell table:formula="of:=IF([.H72]&gt;[.$H$26];[.F72];[.D72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73]+[.D73])/2" office:value-type="float" office:value="2.23606797749973" calcext:value-type="float">
            <text:p>2,23606797749973</text:p>
          </table:table-cell>
          <table:table-cell office:value-type="string" calcext:value-type="string">
            <text:p>|</text:p>
          </table:table-cell>
          <table:table-cell table:formula="of:=[.F73]*[.F73]" office:value-type="float" office:value="4.99999999999973" calcext:value-type="float">
            <text:p>4,9999999999997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3]&lt;[.$H$26];[.F73];[.B73])" office:value-type="float" office:value="2.23606797749973" calcext:value-type="float">
            <text:p>2,23606797749973</text:p>
          </table:table-cell>
          <table:table-cell office:value-type="string" calcext:value-type="string">
            <text:p>|</text:p>
          </table:table-cell>
          <table:table-cell table:formula="of:=IF([.H73]&gt;[.$H$26];[.F73];[.D73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74]+[.D74])/2" office:value-type="float" office:value="2.23606797749976" calcext:value-type="float">
            <text:p>2,23606797749976</text:p>
          </table:table-cell>
          <table:table-cell office:value-type="string" calcext:value-type="string">
            <text:p>|</text:p>
          </table:table-cell>
          <table:table-cell table:formula="of:=[.F74]*[.F74]" office:value-type="float" office:value="4.99999999999989" calcext:value-type="float">
            <text:p>4,99999999999989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4]&lt;[.$H$26];[.F74];[.B74])" office:value-type="float" office:value="2.23606797749976" calcext:value-type="float">
            <text:p>2,23606797749976</text:p>
          </table:table-cell>
          <table:table-cell office:value-type="string" calcext:value-type="string">
            <text:p>|</text:p>
          </table:table-cell>
          <table:table-cell table:formula="of:=IF([.H74]&gt;[.$H$26];[.F74];[.D74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75]+[.D75])/2" office:value-type="float" office:value="2.23606797749978" calcext:value-type="float">
            <text:p>2,23606797749978</text:p>
          </table:table-cell>
          <table:table-cell office:value-type="string" calcext:value-type="string">
            <text:p>|</text:p>
          </table:table-cell>
          <table:table-cell table:formula="of:=[.F75]*[.F75]" office:value-type="float" office:value="4.99999999999997" calcext:value-type="float">
            <text:p>4,99999999999997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5]&lt;[.$H$26];[.F75];[.B75])" office:value-type="float" office:value="2.23606797749978" calcext:value-type="float">
            <text:p>2,23606797749978</text:p>
          </table:table-cell>
          <table:table-cell office:value-type="string" calcext:value-type="string">
            <text:p>|</text:p>
          </table:table-cell>
          <table:table-cell table:formula="of:=IF([.H75]&gt;[.$H$26];[.F75];[.D75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76]+[.D76])/2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F76]*[.F76]" office:value-type="float" office:value="5.00000000000001" calcext:value-type="float">
            <text:p>5,000000000000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6]&lt;[.$H$26];[.F76];[.B76])" office:value-type="float" office:value="2.23606797749978" calcext:value-type="float">
            <text:p>2,23606797749978</text:p>
          </table:table-cell>
          <table:table-cell office:value-type="string" calcext:value-type="string">
            <text:p>|</text:p>
          </table:table-cell>
          <table:table-cell table:formula="of:=IF([.H76]&gt;[.$H$26];[.F76];[.D76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77]+[.D77])/2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F77]*[.F77]" office:value-type="float" office:value="5.00000000000001" calcext:value-type="float">
            <text:p>5,000000000000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7]&lt;[.$H$26];[.F77];[.B77])" office:value-type="float" office:value="2.23606797749978" calcext:value-type="float">
            <text:p>2,23606797749978</text:p>
          </table:table-cell>
          <table:table-cell office:value-type="string" calcext:value-type="string">
            <text:p>|</text:p>
          </table:table-cell>
          <table:table-cell table:formula="of:=IF([.H77]&gt;[.$H$26];[.F77];[.D77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78]+[.D78])/2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F78]*[.F78]" office:value-type="float" office:value="5.00000000000001" calcext:value-type="float">
            <text:p>5,000000000000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8]&lt;[.$H$26];[.F78];[.B78])" office:value-type="float" office:value="2.23606797749978" calcext:value-type="float">
            <text:p>2,23606797749978</text:p>
          </table:table-cell>
          <table:table-cell office:value-type="string" calcext:value-type="string">
            <text:p>|</text:p>
          </table:table-cell>
          <table:table-cell table:formula="of:=IF([.H78]&gt;[.$H$26];[.F78];[.D78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79]+[.D79])/2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F79]*[.F79]" office:value-type="float" office:value="5.00000000000001" calcext:value-type="float">
            <text:p>5,000000000000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79]&lt;[.$H$26];[.F79];[.B79])" office:value-type="float" office:value="2.23606797749978" calcext:value-type="float">
            <text:p>2,23606797749978</text:p>
          </table:table-cell>
          <table:table-cell office:value-type="string" calcext:value-type="string">
            <text:p>|</text:p>
          </table:table-cell>
          <table:table-cell table:formula="of:=IF([.H79]&gt;[.$H$26];[.F79];[.D79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80]+[.D80])/2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F80]*[.F80]" office:value-type="float" office:value="5.00000000000001" calcext:value-type="float">
            <text:p>5,000000000000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80]&lt;[.$H$26];[.F80];[.B80])" office:value-type="float" office:value="2.23606797749978" calcext:value-type="float">
            <text:p>2,23606797749978</text:p>
          </table:table-cell>
          <table:table-cell office:value-type="string" calcext:value-type="string">
            <text:p>|</text:p>
          </table:table-cell>
          <table:table-cell table:formula="of:=IF([.H80]&gt;[.$H$26];[.F80];[.D80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81]+[.D81])/2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F81]*[.F81]" office:value-type="float" office:value="5.00000000000001" calcext:value-type="float">
            <text:p>5,0000000000000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formula="of:=IF([.H81]&lt;[.$H$26];[.F81];[.B81])" office:value-type="float" office:value="2.23606797749978" calcext:value-type="float">
            <text:p>2,23606797749978</text:p>
          </table:table-cell>
          <table:table-cell office:value-type="string" calcext:value-type="string">
            <text:p>|</text:p>
          </table:table-cell>
          <table:table-cell table:formula="of:=IF([.H81]&gt;[.$H$26];[.F81];[.D81])" office:value-type="float" office:value="2.2360679774998" calcext:value-type="float">
            <text:p>2,2360679774998</text:p>
          </table:table-cell>
          <table:table-cell office:value-type="string" calcext:value-type="string">
            <text:p>|</text:p>
          </table:table-cell>
          <table:table-cell table:formula="of:=([.B82]+[.D82])/2" office:value-type="float" office:value="2.23606797749979" calcext:value-type="float">
            <text:p>2,23606797749979</text:p>
          </table:table-cell>
          <table:table-cell office:value-type="string" calcext:value-type="string">
            <text:p>|</text:p>
          </table:table-cell>
          <table:table-cell table:formula="of:=[.F82]*[.F82]" office:value-type="float" office:value="5.00000000000001" calcext:value-type="float">
            <text:p>5,00000000000001</text:p>
          </table:table-cell>
          <table:table-cell office:value-type="string" calcext:value-type="string">
            <text:p>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4T13:53:42.381532345</meta:creation-date>
    <dc:date>2026-04-28T14:43:29.943638111</dc:date>
    <meta:editing-duration>PT57M11S</meta:editing-duration>
    <meta:editing-cycles>2</meta:editing-cycles>
    <meta:generator>LibreOffice/7.3.7.2$Linux_X86_64 LibreOffice_project/30$Build-2</meta:generator>
    <meta:document-statistic meta:table-count="1" meta:cell-count="600" meta:object-count="0"/>
  </office:meta>
</office:document-meta>
</file>